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Calibri6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family-generic="moder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91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97316" draw:fill="solid" draw:fill-color="#f973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f97316" draw:fill="solid" draw:fill-color="#29252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 loext:shadow-blur="0.353cm"/>
    </style:style>
    <style:style style:name="gr4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292524" draw:fill="solid" draw:fill-color="#2925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44403c" draw:fill="solid" draw:fill-color="#29252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 loext:shadow-blur="0.353cm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44403c" draw:fill="solid" draw:fill-color="#4440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1c1917" draw:fill="solid" draw:fill-color="#2925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1c1917" draw:fill="solid" draw:fill-color="#4440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22c55e" draw:fill="solid" draw:fill-color="#29252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 loext:shadow-blur="0.353cm"/>
    </style:style>
    <style:style style:name="gr14" style:family="graphic" style:parent-style-name="standard">
      <style:graphic-properties draw:stroke="solid" svg:stroke-width="0.035cm" svg:stroke-color="#ef4444" draw:fill="solid" draw:fill-color="#29252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 loext:shadow-blur="0.353cm"/>
    </style:style>
    <style:style style:name="gr15" style:family="graphic" style:parent-style-name="standard">
      <style:graphic-properties draw:stroke="solid" svg:stroke-width="0.035cm" svg:stroke-color="#f97316" draw:fill="solid" draw:fill-color="#4440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97316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292524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.282cm" fo:line-height="13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44403c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4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2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ed7aa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6pt" fo:letter-spacing="normal" fo:language="en" fo:country="US" fo:font-style="italic" style:text-underline-style="none" fo:font-weight="normal" fo:background-color="transparent" style:font-name-asian="Calibri5" style:font-size-asian="16pt" style:font-style-asian="italic" style:font-weight-asian="normal" style:font-name-complex="Calibri2" style:font-size-complex="16pt" style:font-style-complex="italic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bold" fo:background-color="transparent" style:font-name-asian="Calibri5" style:font-size-asian="44pt" style:font-style-asian="normal" style:font-weight-asian="bold" style:font-name-complex="Calibri2" style:font-size-complex="44pt" style:font-style-complex="normal" style:font-weight-complex="bold"/>
    </style:style>
    <style:style style:name="T4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5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5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name-asian="Calibri5" style:font-size-asian="8pt" style:font-style-asian="normal" style:font-weight-asian="bold" style:font-name-complex="Calibri2" style:font-size-complex="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name-asian="Calibri5" style:font-size-asian="14pt" style:font-style-asian="normal" style:font-weight-asian="bold" style:font-name-complex="Calibri2" style:font-size-complex="14pt" style:font-style-complex="normal" style:font-weight-complex="bold"/>
    </style:style>
    <style:style style:name="T7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5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8" style:family="text">
      <style:text-properties fo:font-variant="normal" fo:text-transform="none" fo:color="#fb923c" loext:opacity="100%" style:text-line-through-style="none" style:text-line-through-type="none" style:text-position="0% 100%" style:font-name="Consolas" fo:font-size="11pt" fo:letter-spacing="normal" fo:language="en" fo:country="US" fo:font-style="normal" style:text-underline-style="solid" style:text-underline-width="auto" style:text-underline-color="font-color" fo:font-weight="normal" fo:background-color="transparent" style:font-name-asian="Consolas2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name-asian="Calibri5" style:font-size-asian="24pt" style:font-style-asian="normal" style:font-weight-asian="bold" style:font-name-complex="Calibri2" style:font-size-complex="24pt" style:font-style-complex="normal" style:font-weight-complex="bold"/>
    </style:style>
    <style:style style:name="T11" style:family="text">
      <style:text-properties fo:font-variant="normal" fo:text-transform="none" fo:color="#fb923c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5" style:font-size-asian="13pt" style:font-style-asian="normal" style:font-weight-asian="bold" style:font-name-complex="Calibri2" style:font-size-complex="13pt" style:font-style-complex="normal" style:font-weight-complex="bold"/>
    </style:style>
    <style:style style:name="T12" style:family="text">
      <style:text-properties fo:font-variant="normal" fo:text-transform="none" fo:color="#fafaf9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5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" style:family="text">
      <style:text-properties fo:font-variant="normal" fo:text-transform="none" fo:color="#fb923c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name-asian="Calibri5" style:font-size-asian="26pt" style:font-style-asian="normal" style:font-weight-asian="bold" style:font-name-complex="Calibri2" style:font-size-complex="26pt" style:font-style-complex="normal" style:font-weight-complex="bold"/>
    </style:style>
    <style:style style:name="T14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" style:family="text">
      <style:text-properties fo:font-variant="normal" fo:text-transform="none" fo:color="#78716c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5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6" style:family="text">
      <style:text-properties fo:font-variant="normal" fo:text-transform="none" fo:color="#fafaf9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6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8" style:family="text">
      <style:text-properties fo:font-variant="normal" fo:text-transform="none" fo:color="#fafaf9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9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name-asian="Calibri5" style:font-size-asian="32pt" style:font-style-asian="normal" style:font-weight-asian="bold" style:font-name-complex="Calibri2" style:font-size-complex="32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5" style:font-size-asian="13pt" style:font-style-asian="normal" style:font-weight-asian="bold" style:font-name-complex="Calibri2" style:font-size-complex="13pt" style:font-style-complex="normal" style:font-weight-complex="bold"/>
    </style:style>
    <style:style style:name="T21" style:family="text">
      <style:text-properties fo:font-variant="normal" fo:text-transform="none" fo:color="#1c1917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name-asian="Calibri5" style:font-size-asian="22pt" style:font-style-asian="normal" style:font-weight-asian="bold" style:font-name-complex="Calibri2" style:font-size-complex="22pt" style:font-style-complex="normal" style:font-weight-complex="bold"/>
    </style:style>
    <style:style style:name="T22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name-asian="Calibri5" style:font-size-asian="18pt" style:font-style-asian="normal" style:font-weight-asian="bold" style:font-name-complex="Calibri2" style:font-size-complex="18pt" style:font-style-complex="normal" style:font-weight-complex="bold"/>
    </style:style>
    <style:style style:name="T23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56pt" fo:letter-spacing="normal" fo:language="en" fo:country="US" fo:font-style="normal" style:text-underline-style="none" fo:font-weight="bold" fo:background-color="transparent" style:font-name-asian="Calibri5" style:font-size-asian="56pt" style:font-style-asian="normal" style:font-weight-asian="bold" style:font-name-complex="Calibri2" style:font-size-complex="56pt" style:font-style-complex="normal" style:font-weight-complex="bold"/>
    </style:style>
    <style:style style:name="T24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5" style:family="text">
      <style:text-properties fo:font-variant="normal" fo:text-transform="none" fo:color="#fb923c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5" style:font-size-asian="11pt" style:font-style-asian="normal" style:font-weight-asian="bold" style:font-name-complex="Calibri2" style:font-size-complex="11pt" style:font-style-complex="normal" style:font-weight-complex="bold"/>
    </style:style>
    <style:style style:name="T26" style:family="text">
      <style:text-properties fo:font-variant="normal" fo:text-transform="none" fo:color="#fafaf9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7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5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2" style:font-size-asian="12pt" style:font-style-asian="normal" style:font-weight-asian="bold" style:font-name-complex="Consolas" style:font-size-complex="12pt" style:font-style-complex="normal" style:font-weight-complex="bold"/>
    </style:style>
    <style:style style:name="T29" style:family="text">
      <style:text-properties fo:font-variant="normal" fo:text-transform="none" fo:color="#fed7aa" loext:opacity="100%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alibri5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0" style:family="text">
      <style:text-properties fo:font-variant="normal" fo:text-transform="none" fo:color="#1c1917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5" style:font-size-asian="11pt" style:font-style-asian="normal" style:font-weight-asian="bold" style:font-name-complex="Calibri2" style:font-size-complex="11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5" style:font-size-asian="12pt" style:font-style-asian="normal" style:font-weight-asian="bold" style:font-name-complex="Calibri2" style:font-size-complex="12pt" style:font-style-complex="normal" style:font-weight-complex="bold"/>
    </style:style>
    <style:style style:name="T32" style:family="text">
      <style:text-properties fo:font-variant="normal" fo:text-transform="none" fo:color="#fafaf9" loext:opacity="100%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normal" fo:background-color="transparent" style:font-name-asian="Consolas2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33" style:family="text">
      <style:text-properties fo:font-variant="normal" fo:text-transform="none" fo:color="#f97316" loext:opacity="100%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2" style:font-size-asian="13pt" style:font-style-asian="normal" style:font-weight-asian="bold" style:font-name-complex="Consolas" style:font-size-complex="13pt" style:font-style-complex="normal" style:font-weight-complex="bold"/>
    </style:style>
    <style:style style:name="T34" style:family="text">
      <style:text-properties fo:font-variant="normal" fo:text-transform="none" fo:color="#fb923c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5" style:font-size-asian="12pt" style:font-style-asian="normal" style:font-weight-asian="bold" style:font-name-complex="Calibri2" style:font-size-complex="12pt" style:font-style-complex="normal" style:font-weight-complex="bold"/>
    </style:style>
    <style:style style:name="T35" style:family="text">
      <style:text-properties fo:font-variant="normal" fo:text-transform="none" fo:color="#fafaf9" loext:opacity="100%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6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5" style:font-size-asian="11pt" style:font-style-asian="normal" style:font-weight-asian="bold" style:font-name-complex="Calibri2" style:font-size-complex="11pt" style:font-style-complex="normal" style:font-weight-complex="bold"/>
    </style:style>
    <style:style style:name="T37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bold" fo:background-color="transparent" style:font-name-asian="Calibri5" style:font-size-asian="9pt" style:font-style-asian="normal" style:font-weight-asian="bold" style:font-name-complex="Calibri2" style:font-size-complex="9pt" style:font-style-complex="normal" style:font-weight-complex="bold"/>
    </style:style>
    <style:style style:name="T38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5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39" style:family="text">
      <style:text-properties fo:font-variant="normal" fo:text-transform="none" fo:color="#a8a29e" loext:opacity="100%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name-asian="Calibri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40" style:family="text">
      <style:text-properties fo:font-variant="normal" fo:text-transform="none" fo:color="#22c55e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5" style:font-size-asian="12pt" style:font-style-asian="normal" style:font-weight-asian="bold" style:font-name-complex="Calibri2" style:font-size-complex="12pt" style:font-style-complex="normal" style:font-weight-complex="bold"/>
    </style:style>
    <style:style style:name="T41" style:family="text">
      <style:text-properties fo:font-variant="normal" fo:text-transform="none" fo:color="#22c55e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name-asian="Consolas2" style:font-size-asian="14pt" style:font-style-asian="normal" style:font-weight-asian="bold" style:font-name-complex="Consolas" style:font-size-complex="14pt" style:font-style-complex="normal" style:font-weight-complex="bold"/>
    </style:style>
    <style:style style:name="T42" style:family="text">
      <style:text-properties fo:font-variant="normal" fo:text-transform="none" fo:color="#f97316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name-asian="Calibri5" style:font-size-asian="28pt" style:font-style-asian="normal" style:font-weight-asian="bold" style:font-name-complex="Calibri2" style:font-size-complex="28pt" style:font-style-complex="normal" style:font-weight-complex="bold"/>
    </style:style>
    <style:style style:name="T43" style:family="text">
      <style:text-properties fo:font-variant="normal" fo:text-transform="none" fo:color="#ef444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5" style:font-size-asian="12pt" style:font-style-asian="normal" style:font-weight-asian="bold" style:font-name-complex="Calibri2" style:font-size-complex="12pt" style:font-style-complex="normal" style:font-weight-complex="bold"/>
    </style:style>
    <style:style style:name="T44" style:family="text">
      <style:text-properties fo:font-variant="normal" fo:text-transform="none" fo:color="#ef4444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name-asian="Consolas2" style:font-size-asian="14pt" style:font-style-asian="normal" style:font-weight-asian="bold" style:font-name-complex="Consolas" style:font-size-complex="14pt" style:font-style-complex="normal" style:font-weight-complex="bold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ize="13pt" fo:letter-spacing="normal" fo:language="en" fo:country="US" fo:font-style="normal" style:text-underline-style="solid" style:text-underline-width="auto" style:text-underline-color="font-color" fo:font-weight="normal" fo:background-color="transparent" style:font-name-asian="Consolas2" style:font-size-asian="13pt" style:font-style-asian="normal" style:font-weight-asian="normal" style:font-name-complex="Consolas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ed7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8a2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973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b92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min-label-width="0.953cm"/>
        <style:text-properties fo:font-family="StarSymbol" fo:color="#fafa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7871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afa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c19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2c5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558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2.859cm" svg:height="0.761cm" svg:x="1.27cm" svg:y="1.016cm">
          <text:p text:style-name="P2"><text:span text:style-name="T1">COMP-248 <text:s/>· <text:s/>Project in Data Science <text:s/>· <text:s/>Mileston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" draw:text-style-name="P3" draw:layer="layout" svg:width="22.859cm" svg:height="1.523cm" svg:x="1.27cm" svg:y="2.159cm">
          <text:p text:style-name="P2"><text:span text:style-name="T2">Progress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" draw:text-style-name="P3" draw:layer="layout" svg:width="17.779cm" svg:height="5.079cm" svg:x="1.27cm" svg:y="3.81cm">
          <text:p text:style-name="P4"><text:span text:style-name="T3">What Makes a</text:span></text:p>
          <text:p text:style-name="P4"><text:span text:style-name="T3">Successful Video Ga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" draw:text-style-name="P3" draw:layer="layout" svg:width="17.779cm" svg:height="1.777cm" svg:x="1.27cm" svg:y="9.017cm">
          <text:p text:style-name="P2"><text:span text:style-name="T4">A Data-Driven Analysis of Player Reception</text:span></text:p>
          <text:p text:style-name="P2"><text:span text:style-name="T4">and Commercial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" draw:text-style-name="P5" draw:layer="layout" svg:width="4.825cm" svg:height="6.349cm" svg:x="19.558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" draw:text-style-name="P7" draw:layer="layout" svg:width="4.825cm" svg:height="0.634cm" svg:x="19.558cm" svg:y="4.191cm">
          <text:p text:style-name="P6"><text:span text:style-name="T5">AUTH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" draw:text-style-name="P7" draw:layer="layout" svg:width="4.825cm" svg:height="1.777cm" svg:x="19.558cm" svg:y="4.953cm">
          <text:p text:style-name="P8"><text:span text:style-name="T6">Georgios</text:span></text:p>
          <text:p text:style-name="P8"><text:span text:style-name="T6">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" draw:text-style-name="P7" draw:layer="layout" svg:width="4.825cm" svg:height="0.634cm" svg:x="19.558cm" svg:y="6.985cm">
          <text:p text:style-name="P6"><text:span text:style-name="T1">Yea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" draw:text-style-name="P7" draw:layer="layout" svg:width="4.825cm" svg:height="1.523cm" svg:x="19.558cm" svg:y="7.747cm">
          <text:p text:style-name="P9"><text:span text:style-name="T7">BSc in</text:span></text:p>
          <text:p text:style-name="P9"><text:span text:style-name="T7">Data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" draw:text-style-name="P10" draw:layer="layout" svg:width="22.859cm" svg:height="0.761cm" svg:x="1.27cm" svg:y="12.7cm">
          <office:event-listeners>
            <presentation:event-listener script:event-name="dom:click" presentation:action="show" xlink:href="https://github.com/SOTO824/comp248-gaming-project" xlink:type="simple" xlink:show="embed" xlink:actuate="onRequest"/>
          </office:event-listeners>
          <text:p text:style-name="P2"><text:span text:style-name="T8"><text:a xlink:href="https://github.com/SOTO824/comp248-gaming-project" xlink:type="simple">github.com/SOTO824/comp248-gaming-projec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Progress 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5" draw:layer="layout" svg:width="13.969cm" svg:height="10.159cm" svg:x="1.016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3" draw:layer="layout" svg:width="12.953cm" svg:height="0.888cm" svg:x="1.524cm" svg:y="3.048cm">
          <text:p text:style-name="P2"><text:span text:style-name="T11">✓ <text:s/></text:span><text:span text:style-name="T11">Completed Since Mileston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" draw:text-style-name="P3" draw:layer="layout" svg:width="12.953cm" svg:height="8.381cm" svg:x="1.524cm" svg:y="4.191cm">
          <text:list text:style-name="L7">
            <text:list-item>
              <text:p text:style-name="P14"><text:span text:style-name="T12">Built a full preprocessing pipeline (cleaning, missing value imputation, encoding)</text:span></text:p>
            </text:list-item>
            <text:list-item>
              <text:p text:style-name="P14"><text:span text:style-name="T12">Standardised text columns and merged sales with Metacritic on game title</text:span></text:p>
            </text:list-item>
            <text:list-item>
              <text:p text:style-name="P14"><text:span text:style-name="T12">Defined a new combined success label using sales + ratings</text:span></text:p>
            </text:list-item>
            <text:list-item>
              <text:p text:style-name="P14"><text:span text:style-name="T12">Trained and evaluated two ML models — Logistic Regression and Decision Tree</text:span></text:p>
            </text:list-item>
            <text:list-item>
              <text:p text:style-name="P14"><text:span text:style-name="T12">Ran a follow-up experiment to test the strength of non-rating features</text:span></text:p>
            </text:list-item>
            <text:list-item>
              <text:p text:style-name="P14"><text:span text:style-name="T12">All code pushed to public GitHub reposi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5" draw:layer="layout" svg:width="8.635cm" svg:height="2.158cm" svg:x="15.74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253cm" svg:height="2.158cm" svg:x="15.74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7" draw:layer="layout" svg:width="3.555cm" svg:height="1.904cm" svg:x="16.256cm" svg:y="2.794cm">
          <text:p text:style-name="P6"><text:span text:style-name="T1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" draw:text-style-name="P3" draw:layer="layout" svg:width="4.317cm" svg:height="1.396cm" svg:x="19.939cm" svg:y="3.124cm">
          <text:p text:style-name="P2"><text:span text:style-name="T14">Notebooks comp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5" draw:layer="layout" svg:width="8.635cm" svg:height="2.158cm" svg:x="15.748cm" svg:y="5.2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0.253cm" svg:height="2.158cm" svg:x="15.748cm" svg:y="5.2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7" draw:layer="layout" svg:width="3.555cm" svg:height="1.904cm" svg:x="16.256cm" svg:y="5.334cm">
          <text:p text:style-name="P6"><text:span text:style-name="T13">8,6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" draw:text-style-name="P3" draw:layer="layout" svg:width="4.317cm" svg:height="1.396cm" svg:x="19.939cm" svg:y="5.664cm">
          <text:p text:style-name="P2"><text:span text:style-name="T14">Games in final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5" draw:layer="layout" svg:width="8.635cm" svg:height="2.158cm" svg:x="15.748cm" svg:y="7.7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253cm" svg:height="2.158cm" svg:x="15.748cm" svg:y="7.7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7" draw:layer="layout" svg:width="3.555cm" svg:height="1.904cm" svg:x="16.256cm" svg:y="7.874cm">
          <text:p text:style-name="P6"><text:span text:style-name="T13">6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" draw:text-style-name="P3" draw:layer="layout" svg:width="4.317cm" svg:height="1.396cm" svg:x="19.939cm" svg:y="8.204cm">
          <text:p text:style-name="P2"><text:span text:style-name="T14">Best model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8" draw:text-style-name="P5" draw:layer="layout" svg:width="8.635cm" svg:height="2.158cm" svg:x="15.748cm" svg:y="10.2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0.253cm" svg:height="2.158cm" svg:x="15.748cm" svg:y="10.2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" draw:text-style-name="P7" draw:layer="layout" svg:width="3.555cm" svg:height="1.904cm" svg:x="16.256cm" svg:y="10.414cm">
          <text:p text:style-name="P6"><text:span text:style-name="T13">0.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" draw:text-style-name="P3" draw:layer="layout" svg:width="4.317cm" svg:height="1.396cm" svg:x="19.939cm" svg:y="10.744cm">
          <text:p text:style-name="P2"><text:span text:style-name="T14">Best AUC-ROC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Key Change: Redefining Su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" draw:text-style-name="P3" draw:layer="layout" svg:width="11.429cm" svg:height="0.888cm" svg:x="1.27cm" svg:y="2.794cm">
          <text:p text:style-name="P2"><text:span text:style-name="T11"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3" draw:layer="layout" svg:width="11.429cm" svg:height="8.381cm" svg:x="1.27cm" svg:y="3.81cm">
          <text:p text:style-name="P15"><text:span text:style-name="T16">Involving many attributes to define success provides better results than a typical median split. <text:s/></text:span></text:p>
          <text:p text:style-name="P16"><text:span text:style-name="T17"/></text:p>
          <text:p text:style-name="P16"><text:span text:style-name="T18">A more meaningful target was created by combining commercial performance with player and critic reception into a single weighted sc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" draw:text-style-name="P5" draw:layer="layout" svg:width="10.667cm" svg:height="10.032cm" svg:x="13.716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3" draw:layer="layout" svg:width="9.651cm" svg:height="0.888cm" svg:x="14.224cm" svg:y="3.175cm">
          <text:p text:style-name="P2"><text:span text:style-name="T11">Combined Success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3" draw:layer="layout" svg:width="2.539cm" svg:height="2.031cm" svg:x="14.224cm" svg:y="4.445cm">
          <text:p text:style-name="P2"><text:span text:style-name="T19">6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3" draw:layer="layout" svg:width="6.857cm" svg:height="0.888cm" svg:x="17.018cm" svg:y="4.445cm">
          <text:p text:style-name="P2"><text:span text:style-name="T20">Total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" draw:text-style-name="P3" draw:layer="layout" svg:width="6.857cm" svg:height="1.269cm" svg:x="17.018cm" svg:y="5.334cm">
          <text:p text:style-name="P17"><text:span text:style-name="T14">Commercial performance (prim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" draw:text-style-name="P18" draw:layer="layout" svg:width="9.651cm" svg:height="0.126cm" svg:x="14.224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9.143cm" svg:height="0.126cm" svg:x="14.224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" draw:text-style-name="P3" draw:layer="layout" svg:width="2.539cm" svg:height="2.031cm" svg:x="14.224cm" svg:y="7.112cm">
          <text:p text:style-name="P2"><text:span text:style-name="T19">2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" draw:text-style-name="P3" draw:layer="layout" svg:width="6.857cm" svg:height="0.888cm" svg:x="17.018cm" svg:y="7.112cm">
          <text:p text:style-name="P2"><text:span text:style-name="T20">User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" draw:text-style-name="P3" draw:layer="layout" svg:width="6.857cm" svg:height="1.269cm" svg:x="17.018cm" svg:y="8.001cm">
          <text:p text:style-name="P17"><text:span text:style-name="T14">Player sentiment drives word-of-mo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" draw:text-style-name="P18" draw:layer="layout" svg:width="9.651cm" svg:height="0.126cm" svg:x="14.224cm" svg:y="9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3.809cm" svg:height="0.126cm" svg:x="14.224cm" svg:y="9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" draw:text-style-name="P3" draw:layer="layout" svg:width="2.539cm" svg:height="2.031cm" svg:x="14.224cm" svg:y="9.779cm">
          <text:p text:style-name="P2"><text:span text:style-name="T19">1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" draw:text-style-name="P3" draw:layer="layout" svg:width="6.857cm" svg:height="0.888cm" svg:x="17.018cm" svg:y="9.779cm">
          <text:p text:style-name="P2"><text:span text:style-name="T20">Meta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" draw:text-style-name="P3" draw:layer="layout" svg:width="6.857cm" svg:height="1.269cm" svg:x="17.018cm" svg:y="10.668cm">
          <text:p text:style-name="P17"><text:span text:style-name="T14">Professional critic re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8" draw:layer="layout" svg:width="9.651cm" svg:height="0.126cm" svg:x="14.224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" draw:text-style-name="P1" draw:layer="layout" svg:width="2.285cm" svg:height="0.126cm" svg:x="14.224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Implementation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5" draw:layer="layout" svg:width="5.587cm" svg:height="8.127cm" svg:x="1.016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5.587cm" svg:height="1.523cm" svg:x="1.016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7" draw:layer="layout" svg:width="5.587cm" svg:height="1.269cm" svg:x="1.016cm" svg:y="3.937cm">
          <text:p text:style-name="P6"><text:span text:style-name="T21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4.825cm" svg:height="1.269cm" svg:x="1.397cm" svg:y="5.842cm">
          <text:p text:style-name="P6"><text:span text:style-name="T20">Data Col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7" draw:layer="layout" svg:width="4.825cm" svg:height="4.063cm" svg:x="1.397cm" svg:y="7.366cm">
          <text:p text:style-name="P19"><text:span text:style-name="T14">4 datasets loaded:</text:span></text:p>
          <text:p text:style-name="P19"><text:span text:style-name="T14">Sales, Metacritic Games,</text:span></text:p>
          <text:p text:style-name="P19"><text:span text:style-name="T14">Metacritic Reviews, S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7" draw:layer="layout" svg:width="0.507cm" svg:height="1.015cm" svg:x="6.604cm" svg:y="7.366cm">
          <text:p text:style-name="P6"><text:span text:style-name="T22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5" draw:layer="layout" svg:width="5.587cm" svg:height="8.127cm" svg:x="7.112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5.587cm" svg:height="1.523cm" svg:x="7.112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7" draw:layer="layout" svg:width="5.587cm" svg:height="1.269cm" svg:x="7.112cm" svg:y="3.937cm">
          <text:p text:style-name="P6"><text:span text:style-name="T21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7" draw:layer="layout" svg:width="4.825cm" svg:height="1.269cm" svg:x="7.493cm" svg:y="5.842cm">
          <text:p text:style-name="P6"><text:span text:style-name="T20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" draw:text-style-name="P7" draw:layer="layout" svg:width="4.825cm" svg:height="4.063cm" svg:x="7.493cm" svg:y="7.366cm">
          <text:p text:style-name="P19"><text:span text:style-name="T14">Missing values handled</text:span></text:p>
          <text:p text:style-name="P19"><text:span text:style-name="T14">Text standardised</text:span></text:p>
          <text:p text:style-name="P19"><text:span text:style-name="T14">Categoricals enco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" draw:text-style-name="P7" draw:layer="layout" svg:width="0.507cm" svg:height="1.015cm" svg:x="12.7cm" svg:y="7.366cm">
          <text:p text:style-name="P6"><text:span text:style-name="T22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" draw:text-style-name="P5" draw:layer="layout" svg:width="5.587cm" svg:height="8.127cm" svg:x="13.208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5.587cm" svg:height="1.523cm" svg:x="13.208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" draw:text-style-name="P7" draw:layer="layout" svg:width="5.587cm" svg:height="1.269cm" svg:x="13.208cm" svg:y="3.937cm">
          <text:p text:style-name="P6"><text:span text:style-name="T21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" draw:text-style-name="P7" draw:layer="layout" svg:width="4.825cm" svg:height="1.269cm" svg:x="13.589cm" svg:y="5.842cm">
          <text:p text:style-name="P6"><text:span text:style-name="T20">Feature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" draw:text-style-name="P7" draw:layer="layout" svg:width="4.825cm" svg:height="4.063cm" svg:x="13.589cm" svg:y="7.366cm">
          <text:p text:style-name="P19"><text:span text:style-name="T14">Combined success label</text:span></text:p>
          <text:p text:style-name="P19"><text:span text:style-name="T14">Min-max scaling</text:span></text:p>
          <text:p text:style-name="P19"><text:span text:style-name="T14">Merged Metacritic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" draw:text-style-name="P7" draw:layer="layout" svg:width="0.507cm" svg:height="1.015cm" svg:x="18.796cm" svg:y="7.366cm">
          <text:p text:style-name="P6"><text:span text:style-name="T22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" draw:text-style-name="P5" draw:layer="layout" svg:width="5.587cm" svg:height="8.127cm" svg:x="19.304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" draw:text-style-name="P1" draw:layer="layout" svg:width="5.587cm" svg:height="1.523cm" svg:x="19.304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" draw:text-style-name="P7" draw:layer="layout" svg:width="5.587cm" svg:height="1.269cm" svg:x="19.304cm" svg:y="3.937cm">
          <text:p text:style-name="P6"><text:span text:style-name="T21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" draw:text-style-name="P7" draw:layer="layout" svg:width="4.825cm" svg:height="1.269cm" svg:x="19.685cm" svg:y="5.842cm">
          <text:p text:style-name="P6"><text:span text:style-name="T20">ML Mode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" draw:text-style-name="P7" draw:layer="layout" svg:width="4.825cm" svg:height="4.063cm" svg:x="19.685cm" svg:y="7.366cm">
          <text:p text:style-name="P19"><text:span text:style-name="T14">Logistic Regression</text:span></text:p>
          <text:p text:style-name="P19"><text:span text:style-name="T14">Decision Tree</text:span></text:p>
          <text:p text:style-name="P19"><text:span text:style-name="T14">Full metric 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Dataset &amp; ML 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5" draw:layer="layout" svg:width="11.175cm" svg:height="10.159cm" svg:x="1.016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3" draw:layer="layout" svg:width="10.159cm" svg:height="0.888cm" svg:x="1.524cm" svg:y="3.048cm">
          <text:p text:style-name="P2"><text:span text:style-name="T11">Final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3" draw:layer="layout" svg:width="10.159cm" svg:height="2.285cm" svg:x="1.524cm" svg:y="4.191cm">
          <text:p text:style-name="P2"><text:span text:style-name="T23">8,6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3" draw:layer="layout" svg:width="10.159cm" svg:height="1.523cm" svg:x="1.524cm" svg:y="6.477cm">
          <text:p text:style-name="P20"><text:span text:style-name="T24">games with full data</text:span></text:p>
          <text:p text:style-name="P20"><text:span text:style-name="T24">(sales + metascore + usersco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3" draw:layer="layout" svg:width="10.159cm" svg:height="0.761cm" svg:x="1.524cm" svg:y="8.382cm">
          <text:p text:style-name="P2"><text:span text:style-name="T25">Class Ba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8" draw:layer="layout" svg:width="10.159cm" svg:height="0.761cm" svg:x="1.524cm" svg:y="9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5.079cm" svg:height="0.761cm" svg:x="1.524cm" svg:y="9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" draw:text-style-name="P3" draw:layer="layout" svg:width="10.159cm" svg:height="0.761cm" svg:x="1.524cm" svg:y="10.287cm">
          <text:p text:style-name="P2"><text:span text:style-name="T26">4,312 successful <text:s/>· <text:s/>4,312 unsuccessful <text:s/>(50/5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3" draw:layer="layout" svg:width="10.159cm" svg:height="0.761cm" svg:x="1.524cm" svg:y="11.557cm">
          <text:p text:style-name="P2"><text:span text:style-name="T27">Train/Test split: <text:s/>80% / 20% <text:s/>(stratifi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5" draw:layer="layout" svg:width="11.175cm" svg:height="10.159cm" svg:x="13.20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" draw:text-style-name="P3" draw:layer="layout" svg:width="10.159cm" svg:height="0.888cm" svg:x="13.716cm" svg:y="3.048cm">
          <text:p text:style-name="P2"><text:span text:style-name="T11">Features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0.151cm" svg:height="1.396cm" svg:x="13.716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" draw:text-style-name="P3" draw:layer="layout" svg:width="9.651cm" svg:height="0.71cm" svg:x="14.097cm" svg:y="4.445cm">
          <text:p text:style-name="P2"><text:span text:style-name="T28">critic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3" draw:layer="layout" svg:width="9.651cm" svg:height="0.71cm" svg:x="14.097cm" svg:y="5.156cm">
          <text:p text:style-name="P2"><text:span text:style-name="T14">Critic review score (numeric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" draw:text-style-name="P1" draw:layer="layout" svg:width="0.151cm" svg:height="1.396cm" svg:x="13.716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" draw:text-style-name="P3" draw:layer="layout" svg:width="9.651cm" svg:height="0.71cm" svg:x="14.097cm" svg:y="6.223cm">
          <text:p text:style-name="P2"><text:span text:style-name="T28">genre_enco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" draw:text-style-name="P3" draw:layer="layout" svg:width="9.651cm" svg:height="0.71cm" svg:x="14.097cm" svg:y="6.934cm">
          <text:p text:style-name="P2"><text:span text:style-name="T14">Game genre (label encod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" draw:text-style-name="P1" draw:layer="layout" svg:width="0.151cm" svg:height="1.396cm" svg:x="13.716cm" svg:y="8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" draw:text-style-name="P3" draw:layer="layout" svg:width="9.651cm" svg:height="0.71cm" svg:x="14.097cm" svg:y="8.001cm">
          <text:p text:style-name="P2"><text:span text:style-name="T28">console_enco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" draw:text-style-name="P3" draw:layer="layout" svg:width="9.651cm" svg:height="0.71cm" svg:x="14.097cm" svg:y="8.712cm">
          <text:p text:style-name="P2"><text:span text:style-name="T14">Platform (label encod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0.151cm" svg:height="1.396cm" svg:x="13.716cm" svg:y="9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" draw:text-style-name="P3" draw:layer="layout" svg:width="9.651cm" svg:height="0.71cm" svg:x="14.097cm" svg:y="9.779cm">
          <text:p text:style-name="P2"><text:span text:style-name="T28">release_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" draw:text-style-name="P3" draw:layer="layout" svg:width="9.651cm" svg:height="0.71cm" svg:x="14.097cm" svg:y="10.49cm">
          <text:p text:style-name="P2"><text:span text:style-name="T14">Year of rel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7" draw:text-style-name="P3" draw:layer="layout" svg:width="10.159cm" svg:height="0.761cm" svg:x="13.716cm" svg:y="11.811cm">
          <text:p text:style-name="P2"><text:span text:style-name="T29">Target: success_comb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Model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6.603cm" svg:height="1.269cm" svg:x="1.016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7" draw:layer="layout" svg:width="6.603cm" svg:height="1.269cm" svg:x="1.016cm" svg:y="2.921cm">
          <text:p text:style-name="P6"><text:span text:style-name="T30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" draw:text-style-name="P1" draw:layer="layout" svg:width="3.301cm" svg:height="1.269cm" svg:x="7.62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3.301cm" svg:height="1.269cm" svg:x="7.62cm" svg:y="2.921cm">
          <text:p text:style-name="P6"><text:span text:style-name="T30">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3.301cm" svg:height="1.269cm" svg:x="10.922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7" draw:layer="layout" svg:width="3.301cm" svg:height="1.269cm" svg:x="10.922cm" svg:y="2.921cm">
          <text:p text:style-name="P6"><text:span text:style-name="T30">Pr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2.539cm" svg:height="1.269cm" svg:x="14.224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" draw:text-style-name="P7" draw:layer="layout" svg:width="2.539cm" svg:height="1.269cm" svg:x="14.224cm" svg:y="2.921cm">
          <text:p text:style-name="P6"><text:span text:style-name="T30">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2.539cm" svg:height="1.269cm" svg:x="16.764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7" draw:layer="layout" svg:width="2.539cm" svg:height="1.269cm" svg:x="16.764cm" svg:y="2.921cm">
          <text:p text:style-name="P6"><text:span text:style-name="T30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" draw:text-style-name="P1" draw:layer="layout" svg:width="3.555cm" svg:height="1.269cm" svg:x="19.304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" draw:text-style-name="P7" draw:layer="layout" svg:width="3.555cm" svg:height="1.269cm" svg:x="19.304cm" svg:y="2.921cm">
          <text:p text:style-name="P6"><text:span text:style-name="T30">AUC-R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1" draw:text-style-name="P5" draw:layer="layout" svg:width="6.603cm" svg:height="1.396cm" svg:x="1.016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7" draw:layer="layout" svg:width="6.603cm" svg:height="1.396cm" svg:x="1.016cm" svg:y="4.191cm">
          <text:p text:style-name="P6"><text:span text:style-name="T31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1" draw:text-style-name="P5" draw:layer="layout" svg:width="3.301cm" svg:height="1.396cm" svg:x="7.62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" draw:text-style-name="P7" draw:layer="layout" svg:width="3.301cm" svg:height="1.396cm" svg:x="7.62cm" svg:y="4.191cm">
          <text:p text:style-name="P6"><text:span text:style-name="T32">63.07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" draw:text-style-name="P5" draw:layer="layout" svg:width="3.301cm" svg:height="1.396cm" svg:x="10.922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" draw:text-style-name="P7" draw:layer="layout" svg:width="3.301cm" svg:height="1.396cm" svg:x="10.922cm" svg:y="4.191cm">
          <text:p text:style-name="P6"><text:span text:style-name="T32">0.6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1" draw:text-style-name="P5" draw:layer="layout" svg:width="2.539cm" svg:height="1.396cm" svg:x="14.224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" draw:text-style-name="P7" draw:layer="layout" svg:width="2.539cm" svg:height="1.396cm" svg:x="14.224cm" svg:y="4.191cm">
          <text:p text:style-name="P6"><text:span text:style-name="T32">0.5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1" draw:text-style-name="P5" draw:layer="layout" svg:width="2.539cm" svg:height="1.396cm" svg:x="16.764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" draw:text-style-name="P7" draw:layer="layout" svg:width="2.539cm" svg:height="1.396cm" svg:x="16.764cm" svg:y="4.191cm">
          <text:p text:style-name="P6"><text:span text:style-name="T32">0.6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1" draw:text-style-name="P5" draw:layer="layout" svg:width="3.555cm" svg:height="1.396cm" svg:x="19.304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7" draw:text-style-name="P7" draw:layer="layout" svg:width="3.555cm" svg:height="1.396cm" svg:x="19.304cm" svg:y="4.191cm">
          <text:p text:style-name="P6"><text:span text:style-name="T32">0.7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2" draw:text-style-name="P18" draw:layer="layout" svg:width="6.603cm" svg:height="1.396cm" svg:x="1.016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7" draw:text-style-name="P7" draw:layer="layout" svg:width="6.603cm" svg:height="1.396cm" svg:x="1.016cm" svg:y="5.588cm">
          <text:p text:style-name="P6"><text:span text:style-name="T31">Decis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2" draw:text-style-name="P18" draw:layer="layout" svg:width="3.301cm" svg:height="1.396cm" svg:x="7.62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" draw:text-style-name="P7" draw:layer="layout" svg:width="3.301cm" svg:height="1.396cm" svg:x="7.62cm" svg:y="5.588cm">
          <text:p text:style-name="P6"><text:span text:style-name="T33">64.99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2" draw:text-style-name="P18" draw:layer="layout" svg:width="3.301cm" svg:height="1.396cm" svg:x="10.922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7" draw:text-style-name="P7" draw:layer="layout" svg:width="3.301cm" svg:height="1.396cm" svg:x="10.922cm" svg:y="5.588cm">
          <text:p text:style-name="P6"><text:span text:style-name="T32">0.7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2" draw:text-style-name="P18" draw:layer="layout" svg:width="2.539cm" svg:height="1.396cm" svg:x="14.22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" draw:text-style-name="P7" draw:layer="layout" svg:width="2.539cm" svg:height="1.396cm" svg:x="14.224cm" svg:y="5.588cm">
          <text:p text:style-name="P6"><text:span text:style-name="T32">0.4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2" draw:text-style-name="P18" draw:layer="layout" svg:width="2.539cm" svg:height="1.396cm" svg:x="16.76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7" draw:text-style-name="P7" draw:layer="layout" svg:width="2.539cm" svg:height="1.396cm" svg:x="16.764cm" svg:y="5.588cm">
          <text:p text:style-name="P6"><text:span text:style-name="T32">0.56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2" draw:text-style-name="P18" draw:layer="layout" svg:width="3.555cm" svg:height="1.396cm" svg:x="19.30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7" draw:text-style-name="P7" draw:layer="layout" svg:width="3.555cm" svg:height="1.396cm" svg:x="19.304cm" svg:y="5.588cm">
          <text:p text:style-name="P6"><text:span text:style-name="T33">0.7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8" draw:text-style-name="P5" draw:layer="layout" svg:width="23.367cm" svg:height="5.587cm" svg:x="1.016cm" svg:y="7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7" draw:text-style-name="P3" draw:layer="layout" svg:width="22.351cm" svg:height="0.761cm" svg:x="1.524cm" svg:y="7.569cm">
          <text:p text:style-name="P2"><text:span text:style-name="T34">Key Observ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" draw:text-style-name="P1" draw:layer="layout" svg:width="0.761cm" svg:height="0.761cm" svg:x="1.524cm" svg:y="8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2" draw:style-name="gr7" draw:text-style-name="P7" draw:layer="layout" svg:width="0.761cm" svg:height="0.761cm" svg:x="1.524cm" svg:y="8.585cm">
          <text:p text:style-name="P6"><text:span text:style-name="T3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7" draw:text-style-name="P3" draw:layer="layout" svg:width="21.335cm" svg:height="1.269cm" svg:x="2.667cm" svg:y="8.382cm">
          <text:p text:style-name="P21"><text:span text:style-name="T12">Decision Tree slightly outperforms Logistic Regression on both accuracy (65% vs 63%) and AUC-ROC (0.72 vs 0.7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" draw:text-style-name="P1" draw:layer="layout" svg:width="0.761cm" svg:height="0.761cm" svg:x="1.524cm" svg:y="9.98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5" draw:style-name="gr7" draw:text-style-name="P7" draw:layer="layout" svg:width="0.761cm" svg:height="0.761cm" svg:x="1.524cm" svg:y="9.982cm">
          <text:p text:style-name="P6"><text:span text:style-name="T3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7" draw:text-style-name="P3" draw:layer="layout" svg:width="21.335cm" svg:height="1.269cm" svg:x="2.667cm" svg:y="9.779cm">
          <text:p text:style-name="P21"><text:span text:style-name="T12">Both models perform clearly above the 50% random baseline, suggesting genuine predictive signal in th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" draw:text-style-name="P1" draw:layer="layout" svg:width="0.761cm" svg:height="0.761cm" svg:x="1.524cm" svg:y="11.37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8" draw:style-name="gr7" draw:text-style-name="P7" draw:layer="layout" svg:width="0.761cm" svg:height="0.761cm" svg:x="1.524cm" svg:y="11.379cm">
          <text:p text:style-name="P6"><text:span text:style-name="T3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7" draw:text-style-name="P3" draw:layer="layout" svg:width="21.335cm" svg:height="1.269cm" svg:x="2.667cm" svg:y="11.176cm">
          <text:p text:style-name="P21"><text:span text:style-name="T12">Decision Tree is more conservative — higher precision (0.74) but lower recall (0.46) — fewer false positives, more false neg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7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Insight: Critic Score Dom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5" draw:layer="layout" svg:width="13.969cm" svg:height="10.159cm" svg:x="1.016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3" draw:layer="layout" svg:width="12.953cm" svg:height="0.888cm" svg:x="1.524cm" svg:y="3.048cm">
          <text:p text:style-name="P2"><text:span text:style-name="T34">Decision Tree — Feature Impor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3" draw:layer="layout" svg:width="4.063cm" svg:height="0.761cm" svg:x="1.524cm" svg:y="4.445cm">
          <text:p text:style-name="P2"><text:span text:style-name="T35">critic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" draw:text-style-name="P18" draw:layer="layout" svg:width="9.143cm" svg:height="0.558cm" svg:x="1.524cm" svg:y="5.2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8.091cm" svg:height="0.558cm" svg:x="1.524cm" svg:y="5.2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3" draw:layer="layout" svg:width="3.301cm" svg:height="0.761cm" svg:x="11.176cm" svg:y="5.156cm">
          <text:p text:style-name="P22"><text:span text:style-name="T36">88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" draw:text-style-name="P3" draw:layer="layout" svg:width="4.063cm" svg:height="0.761cm" svg:x="1.524cm" svg:y="6.35cm">
          <text:p text:style-name="P2"><text:span text:style-name="T35">release_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" draw:text-style-name="P18" draw:layer="layout" svg:width="9.143cm" svg:height="0.558cm" svg:x="1.524cm" svg:y="7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0.868cm" svg:height="0.558cm" svg:x="1.524cm" svg:y="7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3" draw:layer="layout" svg:width="3.301cm" svg:height="0.761cm" svg:x="11.176cm" svg:y="7.061cm">
          <text:p text:style-name="P22"><text:span text:style-name="T36">9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" draw:text-style-name="P3" draw:layer="layout" svg:width="4.063cm" svg:height="0.761cm" svg:x="1.524cm" svg:y="8.255cm">
          <text:p text:style-name="P2"><text:span text:style-name="T35">genre_enco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8" draw:layer="layout" svg:width="9.143cm" svg:height="0.558cm" svg:x="1.524cm" svg:y="9.0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136cm" svg:height="0.558cm" svg:x="1.524cm" svg:y="9.0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3" draw:layer="layout" svg:width="3.301cm" svg:height="0.761cm" svg:x="11.176cm" svg:y="8.966cm">
          <text:p text:style-name="P22"><text:span text:style-name="T36">1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" draw:text-style-name="P3" draw:layer="layout" svg:width="4.063cm" svg:height="0.761cm" svg:x="1.524cm" svg:y="10.16cm">
          <text:p text:style-name="P2"><text:span text:style-name="T35">console_enco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" draw:text-style-name="P18" draw:layer="layout" svg:width="9.143cm" svg:height="0.558cm" svg:x="1.524cm" svg:y="10.9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0.126cm" svg:height="0.558cm" svg:x="1.524cm" svg:y="10.9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" draw:text-style-name="P3" draw:layer="layout" svg:width="3.301cm" svg:height="0.761cm" svg:x="11.176cm" svg:y="10.871cm">
          <text:p text:style-name="P22"><text:span text:style-name="T36">0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" draw:text-style-name="P5" draw:layer="layout" svg:width="8.889cm" svg:height="10.159cm" svg:x="15.494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" draw:text-style-name="P3" draw:layer="layout" svg:width="7.873cm" svg:height="0.761cm" svg:x="16.002cm" svg:y="3.048cm">
          <text:p text:style-name="P2"><text:span text:style-name="T37">IN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" draw:text-style-name="P3" draw:layer="layout" svg:width="7.873cm" svg:height="2.285cm" svg:x="16.002cm" svg:y="3.81cm">
          <text:p text:style-name="P2"><text:span text:style-name="T23">88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" draw:text-style-name="P3" draw:layer="layout" svg:width="7.873cm" svg:height="1.777cm" svg:x="16.002cm" svg:y="6.223cm">
          <text:p text:style-name="P20"><text:span text:style-name="T18">of the model's predictive power comes from critic_score al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" draw:text-style-name="P3" draw:layer="layout" svg:width="7.873cm" svg:height="4.063cm" svg:x="16.002cm" svg:y="8.382cm">
          <text:p text:style-name="P16"><text:span text:style-name="T38">But critic_score is correlated with metascore and userscore, which partly define the success label. So how strong are the other features alon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Experiment: Testing the In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" draw:text-style-name="P3" draw:layer="layout" svg:width="23.367cm" svg:height="1.015cm" svg:x="1.016cm" svg:y="2.54cm">
          <text:p text:style-name="P2"><text:span text:style-name="T39">What happens if we remove critic_score and predict success using only genre, console and release ye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" draw:text-style-name="P5" draw:layer="layout" svg:width="11.556cm" svg:height="5.587cm" svg:x="1.016cm" svg:y="3.9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3" draw:layer="layout" svg:width="10.667cm" svg:height="0.761cm" svg:x="1.524cm" svg:y="4.318cm">
          <text:p text:style-name="P2"><text:span text:style-name="T40">✓ <text:s/></text:span><text:span text:style-name="T40">WITH <text:s/>critic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3" draw:layer="layout" svg:width="6.095cm" svg:height="0.761cm" svg:x="1.524cm" svg:y="5.334cm">
          <text:p text:style-name="P2"><text:span text:style-name="T12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7" draw:layer="layout" svg:width="2.412cm" svg:height="0.761cm" svg:x="7.62cm" svg:y="5.334cm">
          <text:p text:style-name="P6"><text:span text:style-name="T41">63.07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7" draw:layer="layout" svg:width="2.412cm" svg:height="0.634cm" svg:x="7.62cm" svg:y="6.147cm">
          <text:p text:style-name="P6"><text:span text:style-name="T7">AUC 0.7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" draw:text-style-name="P3" draw:layer="layout" svg:width="6.095cm" svg:height="0.761cm" svg:x="1.524cm" svg:y="7.239cm">
          <text:p text:style-name="P2"><text:span text:style-name="T12">Decis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" draw:text-style-name="P7" draw:layer="layout" svg:width="2.412cm" svg:height="0.761cm" svg:x="7.62cm" svg:y="7.239cm">
          <text:p text:style-name="P6"><text:span text:style-name="T41">64.99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7" draw:layer="layout" svg:width="2.412cm" svg:height="0.634cm" svg:x="7.62cm" svg:y="8.052cm">
          <text:p text:style-name="P6"><text:span text:style-name="T7">AUC 0.7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7" draw:layer="layout" svg:width="1.015cm" svg:height="1.269cm" svg:x="12.573cm" svg:y="6.096cm">
          <text:p text:style-name="P6"><text:span text:style-name="T42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4" draw:text-style-name="P5" draw:layer="layout" svg:width="11.556cm" svg:height="5.587cm" svg:x="12.827cm" svg:y="3.9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" draw:text-style-name="P3" draw:layer="layout" svg:width="10.667cm" svg:height="0.761cm" svg:x="13.335cm" svg:y="4.318cm">
          <text:p text:style-name="P2"><text:span text:style-name="T43">✗ <text:s/></text:span><text:span text:style-name="T43">WITHOUT <text:s/>critic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" draw:text-style-name="P3" draw:layer="layout" svg:width="6.095cm" svg:height="0.761cm" svg:x="13.335cm" svg:y="5.334cm">
          <text:p text:style-name="P2"><text:span text:style-name="T12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7" draw:layer="layout" svg:width="2.412cm" svg:height="0.761cm" svg:x="19.431cm" svg:y="5.334cm">
          <text:p text:style-name="P6"><text:span text:style-name="T44">52.41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" draw:text-style-name="P7" draw:layer="layout" svg:width="2.412cm" svg:height="0.634cm" svg:x="19.431cm" svg:y="6.147cm">
          <text:p text:style-name="P6"><text:span text:style-name="T7">AUC 0.5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" draw:text-style-name="P3" draw:layer="layout" svg:width="6.095cm" svg:height="0.761cm" svg:x="13.335cm" svg:y="7.239cm">
          <text:p text:style-name="P2"><text:span text:style-name="T12">Decis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" draw:text-style-name="P7" draw:layer="layout" svg:width="2.412cm" svg:height="0.761cm" svg:x="19.431cm" svg:y="7.239cm">
          <text:p text:style-name="P6"><text:span text:style-name="T44">55.01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" draw:text-style-name="P7" draw:layer="layout" svg:width="2.412cm" svg:height="0.634cm" svg:x="19.431cm" svg:y="8.052cm">
          <text:p text:style-name="P6"><text:span text:style-name="T7">AUC 0.5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" draw:text-style-name="P5" draw:layer="layout" svg:width="23.367cm" svg:height="2.793cm" svg:x="1.016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" draw:text-style-name="P3" draw:layer="layout" svg:width="22.351cm" svg:height="0.634cm" svg:x="1.524cm" svg:y="10.287cm">
          <text:p text:style-name="P2"><text:span text:style-name="T37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" draw:text-style-name="P3" draw:layer="layout" svg:width="22.351cm" svg:height="1.777cm" svg:x="1.524cm" svg:y="10.973cm">
          <text:p text:style-name="P20"><text:span text:style-name="T12">Both models drop to near-random performance (~50%) without critic_score. This confirms that critic_score was carrying nearly all the predictive signal, and that genre, platform and release year alone are weak predictors of success — partially contradicting the original hypothes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6" draw:text-style-name="P5" draw:layer="layout" svg:width="25.399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558cm" svg:height="2.1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3" draw:layer="layout" svg:width="22.859cm" svg:height="1.396cm" svg:x="1.27cm" svg:y="0.381cm">
          <text:p text:style-name="P2"><text:span text:style-name="T10">What's 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5" draw:layer="layout" svg:width="23.367cm" svg:height="2.412cm" svg:x="1.016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.285cm" svg:height="2.412cm" svg:x="1.016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7" draw:layer="layout" svg:width="2.285cm" svg:height="1.142cm" svg:x="1.016cm" svg:y="3.429cm">
          <text:p text:style-name="P6"><text:span text:style-name="T21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3" draw:layer="layout" svg:width="20.065cm" svg:height="0.812cm" svg:x="3.81cm" svg:y="3.099cm">
          <text:p text:style-name="P2"><text:span text:style-name="T6">Power BI Dashbo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3" draw:layer="layout" svg:width="20.065cm" svg:height="1.142cm" svg:x="3.81cm" svg:y="3.962cm">
          <text:p text:style-name="P21"><text:span text:style-name="T27">Export cleaned datasets and build interactive dashboards showing sales trends, genre comparisons and review patter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5" draw:layer="layout" svg:width="23.367cm" svg:height="2.412cm" svg:x="1.016cm" svg:y="5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2.285cm" svg:height="2.412cm" svg:x="1.016cm" svg:y="5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" draw:text-style-name="P7" draw:layer="layout" svg:width="2.285cm" svg:height="1.142cm" svg:x="1.016cm" svg:y="6.096cm">
          <text:p text:style-name="P6"><text:span text:style-name="T21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3" draw:layer="layout" svg:width="20.065cm" svg:height="0.812cm" svg:x="3.81cm" svg:y="5.766cm">
          <text:p text:style-name="P2"><text:span text:style-name="T6">Final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" draw:text-style-name="P3" draw:layer="layout" svg:width="20.065cm" svg:height="1.142cm" svg:x="3.81cm" svg:y="6.629cm">
          <text:p text:style-name="P21"><text:span text:style-name="T27">Compile a well-narrated Jupyter Notebook documenting the full process, results and limi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" draw:text-style-name="P5" draw:layer="layout" svg:width="23.367cm" svg:height="2.412cm" svg:x="1.016cm" svg:y="8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2.285cm" svg:height="2.412cm" svg:x="1.016cm" svg:y="8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" draw:text-style-name="P7" draw:layer="layout" svg:width="2.285cm" svg:height="1.142cm" svg:x="1.016cm" svg:y="8.763cm">
          <text:p text:style-name="P6"><text:span text:style-name="T21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" draw:text-style-name="P3" draw:layer="layout" svg:width="20.065cm" svg:height="0.812cm" svg:x="3.81cm" svg:y="8.433cm">
          <text:p text:style-name="P2"><text:span text:style-name="T6">Showcase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" draw:text-style-name="P3" draw:layer="layout" svg:width="20.065cm" svg:height="1.142cm" svg:x="3.81cm" svg:y="9.296cm">
          <text:p text:style-name="P21"><text:span text:style-name="T27">Record a video walkthrough of the project for the public showcase upload to YouTub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5" draw:text-style-name="P18" draw:layer="layout" svg:width="23.367cm" svg:height="1.777cm" svg:x="1.0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" draw:text-style-name="P3" draw:layer="layout" svg:width="6.349cm" svg:height="1.269cm" svg:x="1.524cm" svg:y="11.43cm">
          <text:p text:style-name="P2"><text:span text:style-name="T34">📂 <text:s/></text:span><text:span text:style-name="T34">Project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" draw:text-style-name="P10" draw:layer="layout" svg:width="16.509cm" svg:height="1.269cm" svg:x="7.62cm" svg:y="11.43cm">
          <office:event-listeners>
            <presentation:event-listener script:event-name="dom:click" presentation:action="show" xlink:href="https://github.com/SOTO824/comp248-gaming-project" xlink:type="simple" xlink:show="embed" xlink:actuate="onRequest"/>
          </office:event-listeners>
          <text:p text:style-name="P2"><text:span text:style-name="T45"><text:a xlink:href="https://github.com/SOTO824/comp248-gaming-project" xlink:type="simple">github.com/SOTO824/comp248-gaming-projec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" draw:text-style-name="P3" draw:layer="layout" svg:width="23.367cm" svg:height="0.634cm" svg:x="1.016cm" svg:y="13.462cm">
          <text:p text:style-name="P2"><text:span text:style-name="T15">COMP-248 <text:s/>· <text:s/>Milestone 2 <text:s/>· <text:s/>Georgios Sotiri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0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Calibri6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family-generic="moder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ilestone 2 — What Makes a Successful Video Game?</dc:title>
    <dc:subject>PptxGenJS Presentation</dc:subject>
    <meta:initial-creator>PptxGenJS</meta:initial-creator>
    <meta:editing-cycles>2</meta:editing-cycles>
    <meta:creation-date>2026-05-06T17:20:34</meta:creation-date>
    <dc:date>2026-05-06T20:24:32.139000000</dc:date>
    <meta:editing-duration>PT2M43S</meta:editing-duration>
    <meta:generator>LibreOffice/7.3.1.3$Windows_X86_64 LibreOffice_project/a69ca51ded25f3eefd52d7bf9a5fad8c90b87951</meta:generator>
    <meta:document-statistic meta:object-count="282"/>
    <meta:user-defined meta:name="AppVersion">16.0000</meta:user-defined>
    <meta:user-defined meta:name="Company">PptxGenJS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